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4.5965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e Chinnappan (NCS)</meta:initial-creator>
    <dc:creator>Joe Chinnappan (NCS)</dc:creator>
    <meta:creation-date>2026-07-20T09:52:00Z</meta:creation-date>
    <dc:date>2026-07-20T09:53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